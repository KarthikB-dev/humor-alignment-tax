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04D8D054F8DF45E49A75AD13A984EBD5.png" manifest:media-type="image/png"/>
  <manifest:file-entry manifest:full-path="Pictures/464FDEB3FBF649AB92EBBAF9D8DED88E.png" manifest:media-type="image/png"/>
  <manifest:file-entry manifest:full-path="Pictures/266130142BC547D99237316548587DF7.png" manifest:media-type="image/png"/>
  <manifest:file-entry manifest:full-path="Pictures/DD631E61FD81471EACEB7C12C027AA0E.png" manifest:media-type="image/png"/>
  <manifest:file-entry manifest:full-path="Pictures/835F01267EDD400E82B5D58EF976FC74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>
    <style:style style:name="Heading" style:family="text" style:display-name="Heading">
      <style:text-properties fo:font-size="32pt" fo:font-weight="bold" fo:color="#1565C0" fo:font-family="Liberation Sans"/>
    </style:style>
    <style:style style:name="Body" style:family="text" style:display-name="Body">
      <style:text-properties fo:font-size="20pt" fo:font-weight="normal" fo:color="#1a1a2e" fo:font-family="Liberation Sans"/>
    </style:style>
    <style:style style:name="Small" style:family="text" style:display-name="Small">
      <style:text-properties fo:font-size="14pt" fo:font-weight="normal" fo:color="#333333" fo:font-family="Liberation Sans"/>
    </style:style>
  </office:automatic-styles>
  <office:body>
    <office:presentation>
      <draw:page draw:master-page-name="MP">
        <draw:frame svg:width="30cm" svg:height="4cm" svg:x="2cm" svg:y="4cm">
          <draw:text-box>
            <text:p><text:span text:style-name="Heading">Do Safety Constraints Tax Humor?</text:span></text:p>
          </draw:text-box>
        </draw:frame>
        <draw:frame svg:width="30cm" svg:height="2cm" svg:x="2cm" svg:y="9cm">
          <draw:text-box>
            <text:p><text:span text:style-name="Body">Quantifying the Alignment Tax via Distributional Analysis</text:span></text:p>
          </draw:text-box>
        </draw:frame>
        <draw:frame svg:width="30cm" svg:height="1.5cm" svg:x="2cm" svg:y="12cm">
          <draw:text-box>
            <text:p><text:span text:style-name="Small">Karthik Bhattaram  ·  2026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The Core Question</text:span></text:p>
          </draw:text-box>
        </draw:frame>
        <draw:frame svg:width="31cm" svg:height="15.5cm" svg:x="1.5cm" svg:y="3.2cm">
          <draw:text-box>
            <text:p><text:span text:style-name="Body">Hypothesis: RLHF safety training compresses LLM outputs toward</text:span></text:p>
            <text:p><text:span text:style-name="Body">safe, predictable text — reducing the statistical properties</text:span></text:p>
            <text:p><text:span text:style-name="Body">that make jokes funny.</text:span></text:p>
            <text:p><text:span text:style-name="Body"/></text:p>
            <text:p><text:span text:style-name="Body">Three metrics expected to fall under alignment:</text:span></text:p>
            <text:p><text:span text:style-name="Body">  • Punchline surprisal    — unexpected endings</text:span></text:p>
            <text:p><text:span text:style-name="Body">  • Pre-punchline entropy  — model uncertainty before punchline</text:span></text:p>
            <text:p><text:span text:style-name="Body">  • Embedding distance     — semantic leap from setup to punchline</text:span></text:p>
            <text:p><text:span text:style-name="Body"/></text:p>
            <text:p><text:span text:style-name="Body">Three models tested:</text:span></text:p>
            <text:p><text:span text:style-name="Body">  Base  →  Instruct (RLHF)  →  Safety-finetuned (ours)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Datasets</text:span></text:p>
          </draw:text-box>
        </draw:frame>
        <draw:frame svg:width="15.5cm" svg:height="15.5cm" svg:x="1cm" svg:y="3.2cm">
          <draw:text-box>
            <text:p><text:span text:style-name="Body">Joke corpora:</text:span></text:p>
            <text:p><text:span text:style-name="Body">  r/Jokes</text:span></text:p>
            <text:p><text:span text:style-name="Body">    194,553 Reddit jokes</text:span></text:p>
            <text:p><text:span text:style-name="Body">  One-liners</text:span></text:p>
            <text:p><text:span text:style-name="Body">    3,200 short jokes</text:span></text:p>
            <text:p><text:span text:style-name="Body">  1,000 per source used</text:span></text:p>
            <text:p><text:span text:style-name="Body">  for metric extraction</text:span></text:p>
          </draw:text-box>
        </draw:frame>
        <draw:frame svg:width="15.5cm" svg:height="15.5cm" svg:x="17.5cm" svg:y="3.2cm">
          <draw:text-box>
            <text:p><text:span text:style-name="Body">Safety fine-tuning data:</text:span></text:p>
            <text:p><text:span text:style-name="Body">  AdvBench</text:span></text:p>
            <text:p><text:span text:style-name="Body">    520 harmful prompts</text:span></text:p>
            <text:p><text:span text:style-name="Body">  HarmBench</text:span></text:p>
            <text:p><text:span text:style-name="Body">    400 harmful prompts</text:span></text:p>
            <text:p><text:span text:style-name="Body">  920 total (prompt, refusal)</text:span></text:p>
            <text:p><text:span text:style-name="Body">  7 varied refusal templates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Models</text:span></text:p>
          </draw:text-box>
        </draw:frame>
        <draw:frame svg:width="31cm" svg:height="15.5cm" svg:x="1.5cm" svg:y="3.2cm">
          <draw:text-box>
            <text:p><text:span text:style-name="Body">Base     Llama 3.2-1B              Pre-training only</text:span></text:p>
            <text:p><text:span text:style-name="Body">         1.2B params</text:span></text:p>
            <text:p><text:span text:style-name="Body"/></text:p>
            <text:p><text:span text:style-name="Body">Instruct Llama 3.2-1B-Instruct     + RLHF / instruction tuning</text:span></text:p>
            <text:p><text:span text:style-name="Body">         1.2B params</text:span></text:p>
            <text:p><text:span text:style-name="Body"/></text:p>
            <text:p><text:span text:style-name="Body">Safety   Llama 3.2-1B-Instruct     + LoRA refusal fine-tune</text:span></text:p>
            <text:p><text:span text:style-name="Body">  (ours) 1.2B params               AdvBench + HarmBench</text:span></text:p>
            <text:p><text:span text:style-name="Body"/></text:p>
            <text:p><text:span text:style-name="Body">Safety fine-tuning: LoRA r=16, 3 epochs, lr=2e-4,</text:span></text:p>
            <text:p><text:span text:style-name="Body">response-only loss. Training loss: 3.72 → 0.34,  accuracy: ~90%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Three Distributional Metrics</text:span></text:p>
          </draw:text-box>
        </draw:frame>
        <draw:frame svg:width="31cm" svg:height="15.5cm" svg:x="1.5cm" svg:y="3.2cm">
          <draw:text-box>
            <text:p><text:span text:style-name="Body">1. Punchline Surprisal</text:span></text:p>
            <text:p><text:span text:style-name="Body">   Mean −log P(punchline tokens given setup).</text:span></text:p>
            <text:p><text:span text:style-name="Body">   High = model didn't predict the punchline.</text:span></text:p>
            <text:p><text:span text:style-name="Body"/></text:p>
            <text:p><text:span text:style-name="Body">2. Pre-punchline Entropy</text:span></text:p>
            <text:p><text:span text:style-name="Body">   Shannon entropy of next-token distribution at setup end.</text:span></text:p>
            <text:p><text:span text:style-name="Body">   High = model uncertain about what comes next.</text:span></text:p>
            <text:p><text:span text:style-name="Body"/></text:p>
            <text:p><text:span text:style-name="Body">3. Setup–Punchline Embedding Distance</text:span></text:p>
            <text:p><text:span text:style-name="Body">   Cosine distance between sentence embeddings.</text:span></text:p>
            <text:p><text:span text:style-name="Body">   High = punchline is conceptually far from setup (semantic leap).</text:span></text:p>
            <text:p><text:span text:style-name="Body"/></text:p>
            <text:p><text:span text:style-name="Body">Inverted-U hypothesis: humor quality peaks at MODERATE values of all three.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Safety Fine-tuning: Training Curve</text:span></text:p>
          </draw:text-box>
        </draw:frame>
        <draw:frame svg:width="31cm" svg:height="15.3cm" svg:x="1.5cm" svg:y="3cm">
          <draw:image xlink:href="Pictures/04D8D054F8DF45E49A75AD13A984EBD5.png" xlink:type="simple" xlink:show="embed" xlink:actuate="onLoad"/>
        </draw:frame>
        <draw:frame svg:width="31cm" svg:height="1cm" svg:x="1.5cm" svg:y="18.2cm">
          <draw:text-box>
            <text:p><text:span text:style-name="Small">Loss converges 3.72 → 0.34 over 3 epochs (165 steps). Token accuracy ~90%.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Results: Metric Means</text:span></text:p>
          </draw:text-box>
        </draw:frame>
        <draw:frame svg:width="31cm" svg:height="15.3cm" svg:x="1.5cm" svg:y="3cm">
          <draw:image xlink:href="Pictures/464FDEB3FBF649AB92EBBAF9D8DED88E.png" xlink:type="simple" xlink:show="embed" xlink:actuate="onLoad"/>
        </draw:frame>
      </draw:page>
      <draw:page draw:master-page-name="MP">
        <draw:frame svg:width="32cm" svg:height="2cm" svg:x="1cm" svg:y="0.4cm">
          <draw:text-box>
            <text:p><text:span text:style-name="Heading">Results: Full Distributions</text:span></text:p>
          </draw:text-box>
        </draw:frame>
        <draw:frame svg:width="31cm" svg:height="15.3cm" svg:x="1.5cm" svg:y="3cm">
          <draw:image xlink:href="Pictures/266130142BC547D99237316548587DF7.png" xlink:type="simple" xlink:show="embed" xlink:actuate="onLoad"/>
        </draw:frame>
      </draw:page>
      <draw:page draw:master-page-name="MP">
        <draw:frame svg:width="32cm" svg:height="2cm" svg:x="1cm" svg:y="0.4cm">
          <draw:text-box>
            <text:p><text:span text:style-name="Heading">Results: Metric Progression</text:span></text:p>
          </draw:text-box>
        </draw:frame>
        <draw:frame svg:width="31cm" svg:height="15.3cm" svg:x="1.5cm" svg:y="3cm">
          <draw:image xlink:href="Pictures/DD631E61FD81471EACEB7C12C027AA0E.png" xlink:type="simple" xlink:show="embed" xlink:actuate="onLoad"/>
        </draw:frame>
      </draw:page>
      <draw:page draw:master-page-name="MP">
        <draw:frame svg:width="32cm" svg:height="2cm" svg:x="1cm" svg:y="0.4cm">
          <draw:text-box>
            <text:p><text:span text:style-name="Heading">Results: Statistical Comparison</text:span></text:p>
          </draw:text-box>
        </draw:frame>
        <draw:frame svg:width="31cm" svg:height="15.5cm" svg:x="1.5cm" svg:y="3.2cm">
          <draw:text-box>
            <text:p><text:span text:style-name="Small">Base → Instruct:</text:span></text:p>
            <text:p><text:span text:style-name="Small">  Surprisal  +0.339   Cohen d=0.18   p = 2e-15  ***</text:span></text:p>
            <text:p><text:span text:style-name="Small">  Entropy    +0.210   Cohen d=0.08   p = 0.071</text:span></text:p>
            <text:p><text:span text:style-name="Small">  Distance   +0.035   Cohen d=0.41   p = 2e-27  ***</text:span></text:p>
            <text:p><text:span text:style-name="Small"/></text:p>
            <text:p><text:span text:style-name="Small">Instruct → Safety:</text:span></text:p>
            <text:p><text:span text:style-name="Small">  Surprisal  +0.092   Cohen d=0.05   p = 0.016  *</text:span></text:p>
            <text:p><text:span text:style-name="Small">  Entropy    +0.439   Cohen d=0.16   p = 1e-7   ***</text:span></text:p>
            <text:p><text:span text:style-name="Small">  Distance   +0.008   Cohen d=0.07   p = 0.56   n.s.</text:span></text:p>
            <text:p><text:span text:style-name="Small"/></text:p>
            <text:p><text:span text:style-name="Small">Base → Safety (cumulative):</text:span></text:p>
            <text:p><text:span text:style-name="Small">  Surprisal  +0.431   Cohen d=0.23   p = 3e-24  ***</text:span></text:p>
            <text:p><text:span text:style-name="Small">  Entropy    +0.648   Cohen d=0.24   p = 5e-14  ***</text:span></text:p>
            <text:p><text:span text:style-name="Small">  Distance   +0.043   Cohen d=0.45   p = 4e-25  ***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Temperature Sweep</text:span></text:p>
          </draw:text-box>
        </draw:frame>
        <draw:frame svg:width="31cm" svg:height="15.3cm" svg:x="1.5cm" svg:y="3cm">
          <draw:image xlink:href="Pictures/835F01267EDD400E82B5D58EF976FC74.png" xlink:type="simple" xlink:show="embed" xlink:actuate="onLoad"/>
        </draw:frame>
        <draw:frame svg:width="31cm" svg:height="1cm" svg:x="1.5cm" svg:y="18.2cm">
          <draw:text-box>
            <text:p><text:span text:style-name="Small">Higher temperature raises both metrics. Instruct stays above Base at all temps.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Key Finding: Disruption, Not Compression</text:span></text:p>
          </draw:text-box>
        </draw:frame>
        <draw:frame svg:width="31cm" svg:height="15.5cm" svg:x="1.5cm" svg:y="3.2cm">
          <draw:text-box>
            <text:p><text:span text:style-name="Body">All three metrics INCREASE at every alignment step.</text:span></text:p>
            <text:p><text:span text:style-name="Body">Safety training does NOT compress outputs toward predictable text.</text:span></text:p>
            <text:p><text:span text:style-name="Body"/></text:p>
            <text:p><text:span text:style-name="Body">Two distinct mechanisms:</text:span></text:p>
            <text:p><text:span text:style-name="Body"/></text:p>
            <text:p><text:span text:style-name="Body">  Base → Instruct (driven by surprisal &amp; distance):</text:span></text:p>
            <text:p><text:span text:style-name="Body">    RLHF sensitises the model to harmful content.</text:span></text:p>
            <text:p><text:span text:style-name="Body">    Offensive punchlines become more surprising.</text:span></text:p>
            <text:p><text:span text:style-name="Body">    Clean classic jokes are better predicted (RLHF familiarity effect).</text:span></text:p>
            <text:p><text:span text:style-name="Body"/></text:p>
            <text:p><text:span text:style-name="Body">  Instruct → Safety (driven by entropy):</text:span></text:p>
            <text:p><text:span text:style-name="Body">    Refusal fine-tuning disrupts next-token confidence across all text.</text:span></text:p>
            <text:p><text:span text:style-name="Body">    Collateral damage from a narrow 920-example training distribution.</text:span></text:p>
            <text:p><text:span text:style-name="Body">    Distance barely moves — semantic leap unchanged.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Example Jokes: Largest Divergences</text:span></text:p>
          </draw:text-box>
        </draw:frame>
        <draw:frame svg:width="15.5cm" svg:height="15.5cm" svg:x="1cm" svg:y="3.2cm">
          <draw:text-box>
            <text:p><text:span text:style-name="Small">Instruct &gt;&gt; Base surprisal:</text:span></text:p>
            <text:p><text:span text:style-name="Small">(offensive jokes)</text:span></text:p>
            <text:p><text:span text:style-name="Small"/></text:p>
            <text:p><text:span text:style-name="Small">"What do you call a guy</text:span></text:p>
            <text:p><text:span text:style-name="Small"> who gets lots of blowjobs?"</text:span></text:p>
            <text:p><text:span text:style-name="Small">→ Successful</text:span></text:p>
            <text:p><text:span text:style-name="Small">Base: 14.2   Inst: 18.0   Δ=+3.84</text:span></text:p>
            <text:p><text:span text:style-name="Small"/></text:p>
            <text:p><text:span text:style-name="Small">"What can you make with</text:span></text:p>
            <text:p><text:span text:style-name="Small"> epileptic lettuce?"</text:span></text:p>
            <text:p><text:span text:style-name="Small">→ A seizure salad</text:span></text:p>
            <text:p><text:span text:style-name="Small">Base: 7.2    Inst: 10.7   Δ=+3.58</text:span></text:p>
          </draw:text-box>
        </draw:frame>
        <draw:frame svg:width="15.5cm" svg:height="15.5cm" svg:x="17.5cm" svg:y="3.2cm">
          <draw:text-box>
            <text:p><text:span text:style-name="Small">Base &gt;&gt; Instruct surprisal:</text:span></text:p>
            <text:p><text:span text:style-name="Small">(classic clean jokes)</text:span></text:p>
            <text:p><text:span text:style-name="Small"/></text:p>
            <text:p><text:span text:style-name="Small">"Why did the hungry baby</text:span></text:p>
            <text:p><text:span text:style-name="Small"> calf cross the road?"</text:span></text:p>
            <text:p><text:span text:style-name="Small">→ To get to the udder side.</text:span></text:p>
            <text:p><text:span text:style-name="Small">Base: 7.1    Inst: 5.7   Δ=−1.43</text:span></text:p>
            <text:p><text:span text:style-name="Small"/></text:p>
            <text:p><text:span text:style-name="Small">"For Sale: French WWII Rifle"</text:span></text:p>
            <text:p><text:span text:style-name="Small">→ Never fired. Only dropped once.</text:span></text:p>
            <text:p><text:span text:style-name="Small">Base: 7.7    Inst: 6.5   Δ=−1.19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Conclusion &amp; Future Work</text:span></text:p>
          </draw:text-box>
        </draw:frame>
        <draw:frame svg:width="15.5cm" svg:height="15.5cm" svg:x="1cm" svg:y="3.2cm">
          <draw:text-box>
            <text:p><text:span text:style-name="Body">Findings:</text:span></text:p>
            <text:p><text:span text:style-name="Body">  Inverted-U not confirmed (1B, noisy)</text:span></text:p>
            <text:p><text:span text:style-name="Body">  Alignment shift confirmed —</text:span></text:p>
            <text:p><text:span text:style-name="Body">    direction is UPWARD</text:span></text:p>
            <text:p><text:span text:style-name="Body">  Two distinct mechanisms:</text:span></text:p>
            <text:p><text:span text:style-name="Body">    RLHF content-sensitisation</text:span></text:p>
            <text:p><text:span text:style-name="Body">    Safety entropy disruption</text:span></text:p>
            <text:p><text:span text:style-name="Body"/></text:p>
            <text:p><text:span text:style-name="Body">Limitations:</text:span></text:p>
            <text:p><text:span text:style-name="Body">  1B model is weak</text:span></text:p>
            <text:p><text:span text:style-name="Body">  Offensive jokes confound results</text:span></text:p>
            <text:p><text:span text:style-name="Body">  Only 920 refusal examples</text:span></text:p>
          </draw:text-box>
        </draw:frame>
        <draw:frame svg:width="15.5cm" svg:height="15.5cm" svg:x="17.5cm" svg:y="3.2cm">
          <draw:text-box>
            <text:p><text:span text:style-name="Body">Future work:</text:span></text:p>
            <text:p><text:span text:style-name="Body">  Filter to clean-only jokes</text:span></text:p>
            <text:p><text:span text:style-name="Body">  and re-test compression hypothesis</text:span></text:p>
            <text:p><text:span text:style-name="Body"/></text:p>
            <text:p><text:span text:style-name="Body">  Scale to Llama 3.1-8B</text:span></text:p>
            <text:p><text:span text:style-name="Body"/></text:p>
            <text:p><text:span text:style-name="Body">  Full LLM-as-judge humor</text:span></text:p>
            <text:p><text:span text:style-name="Body">  scoring at scale</text:span></text:p>
            <text:p><text:span text:style-name="Body"/></text:p>
            <text:p><text:span text:style-name="Body">  Probe whether elevated entropy</text:span></text:p>
            <text:p><text:span text:style-name="Body">  improves joke generation quality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/>
  <office:automatic-styles>
    <style:page-layout style:name="PL">
      <style:page-layout-properties fo:margin="0cm" fo:page-width="33.87cm" fo:page-height="19.05cm" style:print-orientation="landscape"/>
    </style:page-layout>
  </office:automatic-styles>
  <office:master-styles>
    <style:master-page style:name="MP" style:page-layout-name="PL" style:display-name="MP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2</meta:generator>
  </office:meta>
</office:document-meta>
</file>